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70000017AAD8E84F6.png" manifest:media-type="image/png"/>
  <manifest:file-entry manifest:full-path="Pictures/100000000000034300000251F0A08043.jpg" manifest:media-type="image/jpeg"/>
  <manifest:file-entry manifest:full-path="Pictures/10000000000002D000000640BA30F25C.jpg" manifest:media-type="image/jpeg"/>
  <manifest:file-entry manifest:full-path="Pictures/100000010000013C00000125AB9F6884.png" manifest:media-type="image/png"/>
  <manifest:file-entry manifest:full-path="Pictures/100000010000017300000195ADA8CD5D.png" manifest:media-type="image/png"/>
  <manifest:file-entry manifest:full-path="Pictures/10000000000002D0000006401006A007.jpg" manifest:media-type="image/jpeg"/>
  <manifest:file-entry manifest:full-path="Pictures/100000010000018B00000142C29F4E05.png" manifest:media-type="image/png"/>
  <manifest:file-entry manifest:full-path="Pictures/10000001000002F00000018345AC1823.png" manifest:media-type="image/png"/>
  <manifest:file-entry manifest:full-path="Pictures/1000000100000297000002A839272E04.png" manifest:media-type="image/png"/>
  <manifest:file-entry manifest:full-path="Pictures/1000000100000190000002B044A94D22.png" manifest:media-type="image/png"/>
  <manifest:file-entry manifest:full-path="Pictures/10000001000002DB0000014F56132CE0.png" manifest:media-type="image/png"/>
  <manifest:file-entry manifest:full-path="Pictures/10000001000002F30000021E849DC1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689" officeooo:paragraph-rsid="001426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fdgdf</text:p>
      <text:p text:style-name="P1"><draw:frame draw:style-name="fr2" draw:name="Figura1" text:anchor-type="char" svg:width="15.983cm" svg:height="11.472cm" draw:z-index="0"><draw:image xlink:href="Pictures/10000001000002F30000021E849DC1DC.png" xlink:type="simple" xlink:show="embed" xlink:actuate="onLoad" draw:mime-type="image/png"/></draw:frame></text:p>
      <text:p text:style-name="P1"/>
      <text:p text:style-name="P1">fgdf</text:p>
      <text:p text:style-name="P1"><draw:frame draw:style-name="fr2" draw:name="Figura2" text:anchor-type="char" svg:width="15.475cm" svg:height="7.091cm" draw:z-index="1"><draw:image xlink:href="Pictures/10000001000002DB0000014F56132CE0.png" xlink:type="simple" xlink:show="embed" xlink:actuate="onLoad" draw:mime-type="image/png"/></draw:frame></text:p>
      <text:p text:style-name="P1"/>
      <text:p text:style-name="P1">dfg</text:p>
      <text:p text:style-name="P1"><draw:frame draw:style-name="fr3" draw:name="Figura3" text:anchor-type="char" svg:width="14.034cm" svg:height="14.393cm" draw:z-index="2"><draw:image xlink:href="Pictures/1000000100000297000002A839272E04.png" xlink:type="simple" xlink:show="embed" xlink:actuate="onLoad" draw:mime-type="image/png"/></draw:frame><text:soft-page-break/></text:p>
      <text:p text:style-name="P1"/>
      <text:p text:style-name="P1"/>
      <text:p text:style-name="P1">dfg</text:p>
      <text:p text:style-name="P1"><draw:frame draw:style-name="fr3" draw:name="Figura4" text:anchor-type="char" svg:width="8.467cm" svg:height="14.563cm" draw:z-index="3"><draw:image xlink:href="Pictures/1000000100000190000002B044A94D22.png" xlink:type="simple" xlink:show="embed" xlink:actuate="onLoad" draw:mime-type="image/png"/></draw:frame></text:p>
      <text:p text:style-name="P1"/>
      <text:p text:style-name="P1">gdfd</text:p>
      <text:p text:style-name="P1"/>
      <text:p text:style-name="P1"/>
      <text:p text:style-name="P1"/>
      <text:p text:style-name="P1">fg</text:p>
      <text:p text:style-name="P1"/>
      <text:p text:style-name="P1">fggf</text:p>
      <text:p text:style-name="P1"/>
      <text:p text:style-name="P1"/>
      <text:p text:style-name="P1"/>
      <text:p text:style-name="P1">fgg</text:p>
      <text:p text:style-name="P1">f</text:p>
      <text:p text:style-name="P1"/>
      <text:p text:style-name="P1"/>
      <text:p text:style-name="P1">fg</text:p>
      <text:p text:style-name="P1">gf</text:p>
      <text:p text:style-name="P1"/>
      <text:p text:style-name="P1"><text:soft-page-break/>gf<draw:frame draw:style-name="fr2" draw:name="Figura5" text:anchor-type="char" svg:width="15.917cm" svg:height="8.192cm" draw:z-index="4"><draw:image xlink:href="Pictures/10000001000002F00000018345AC1823.png" xlink:type="simple" xlink:show="embed" xlink:actuate="onLoad" draw:mime-type="image/png"/></draw:frame></text:p>
      <text:p text:style-name="P1">f</text:p>
      <text:p text:style-name="P1"><draw:frame draw:style-name="fr2" draw:name="Figura6" text:anchor-type="char" svg:width="8.361cm" svg:height="6.816cm" draw:z-index="5"><draw:image xlink:href="Pictures/100000010000018B00000142C29F4E05.png" xlink:type="simple" xlink:show="embed" xlink:actuate="onLoad" draw:mime-type="image/png"/></draw:frame></text:p>
      <text:p text:style-name="P1">ff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fd</text:p>
      <text:p text:style-name="P1"><draw:frame draw:style-name="fr2" draw:name="Figura7" text:anchor-type="char" svg:width="7.853cm" svg:height="8.573cm" draw:z-index="6"><draw:image xlink:href="Pictures/100000010000017300000195ADA8CD5D.png" xlink:type="simple" xlink:show="embed" xlink:actuate="onLoad" draw:mime-type="image/png"/></draw:frame></text:p>
      <text:p text:style-name="P1"/>
      <text:p text:style-name="P1"/>
      <text:p text:style-name="P1">d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df</text:p>
      <text:p text:style-name="P1"><draw:frame draw:style-name="fr2" draw:name="Figura8" text:anchor-type="char" svg:width="6.689cm" svg:height="6.202cm" draw:z-index="7"><draw:image xlink:href="Pictures/100000010000013C00000125AB9F68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d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9" text:anchor-type="char" svg:x="3.56cm" svg:y="0.314cm" svg:width="7.766cm" svg:height="17.258cm" draw:z-index="8"><draw:image xlink:href="Pictures/10000000000002D0000006401006A007.jpg" xlink:type="simple" xlink:show="embed" xlink:actuate="onLoad" draw:mime-type="image/jpeg"/></draw:frame></text:p>
      <text:p text:style-name="P1"/>
      <text:p text:style-name="P1"/>
      <text:p text:style-name="P1">d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hgfhhg</text:p>
      <text:p text:style-name="P1"/>
      <text:p text:style-name="P1"><draw:frame draw:style-name="fr3" draw:name="Figura10" text:anchor-type="char" svg:width="9.001cm" svg:height="20.003cm" draw:z-index="9"><draw:image xlink:href="Pictures/10000000000002D000000640BA30F25C.jpg" xlink:type="simple" xlink:show="embed" xlink:actuate="onLoad" draw:mime-type="image/jpeg"/></draw:frame></text:p>
      <text:p text:style-name="P1"/>
      <text:p text:style-name="P1"/>
      <text:p text:style-name="P1">hghg</text:p>
      <text:p text:style-name="P1"/>
      <text:p text:style-name="P1"/>
      <text:p text:style-name="P1"/>
      <text:p text:style-name="P1"/>
      <text:p text:style-name="P1">hhfd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fdffddf</text:p>
      <text:p text:style-name="P1"/>
      <text:p text:style-name="P1"/>
      <text:p text:style-name="P1"><draw:frame draw:style-name="fr2" draw:name="Figura11" text:anchor-type="char" svg:width="11.19cm" svg:height="9.999cm" draw:z-index="10"><draw:image xlink:href="Pictures/10000000000001A70000017AAD8E84F6.png" xlink:type="simple" xlink:show="embed" xlink:actuate="onLoad" draw:mime-type="image/png"/></draw:frame><text:soft-page-break/>logo da empresa: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bela de preços:</text:p>
      <text:p text:style-name="P1"/>
      <text:p text:style-name="P1"/>
      <text:p text:style-name="P1"><draw:frame draw:style-name="fr1" draw:name="Figura12" text:anchor-type="char" svg:x="0.318cm" svg:y="0.531cm" svg:width="17cm" svg:height="12.072cm" draw:z-index="11"><draw:image xlink:href="Pictures/100000000000034300000251F0A0804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19:27:38.617902498</meta:creation-date>
    <meta:print-date>2026-06-21T19:32:22.609916077</meta:print-date>
    <meta:printed-by>Arquivos PDF</meta:printed-by>
    <dc:date>2026-06-21T20:33:53.370069918</dc:date>
    <meta:editing-duration>PT56M</meta:editing-duration>
    <meta:editing-cycles>1</meta:editing-cycles>
    <meta:document-statistic meta:table-count="0" meta:image-count="12" meta:object-count="0" meta:page-count="6" meta:paragraph-count="26" meta:word-count="30" meta:character-count="111" meta:non-whitespace-character-count="105"/>
    <meta:generator>LibreOffice/24.2.7.2$Linux_X86_64 LibreOffice_project/420$Build-2</meta:generator>
  </office:meta>
</office:document-meta>
</file>